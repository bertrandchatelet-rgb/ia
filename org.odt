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4aa" officeooo:paragraph-rsid="001c4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ier markup pour :<text:line-break/>-projet datascientest</text:p>
      <text:p text:style-name="P1">-2 projets mirna + supprimer ref mirna</text:p>
      <text:p text:style-name="P1">comment intergrer mlflow avec les 2 projets précédents ?</text:p>
      <text:p text:style-name="P1">--------------------------------</text:p>
      <text:p text:style-name="P1">git remote add -f projet1 https://github.com/user/projet1.git</text:p>
      <text:p text:style-name="P1">git merge -s ours --no-commit --allow-unrelated-histories projet1/main</text:p>
      <text:p text:style-name="P1">git read-tree --prefix=projet1/ -u projet1/main</text:p>
      <text:p text:style-name="P1">git commit -m "Subtree merged in projet1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05T14:53:39.918462600</meta:creation-date>
    <dc:date>2026-06-05T14:59:08.254836300</dc:date>
    <meta:editing-duration>PT5M26S</meta:editing-duration>
    <meta:editing-cycles>5</meta:editing-cycles>
    <meta:generator>LibreOffice/26.2.1.2$Windows_X86_64 LibreOffice_project/620$Build-2</meta:generator>
    <meta:document-statistic meta:table-count="0" meta:image-count="0" meta:object-count="0" meta:page-count="1" meta:paragraph-count="8" meta:word-count="51" meta:character-count="388" meta:non-whitespace-character-count="348"/>
  </office:meta>
</office:document-meta>
</file>